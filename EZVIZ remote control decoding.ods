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37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3.82mm"/>
    </style:style>
    <style:style style:name="co4" style:family="table-column">
      <style:table-column-properties fo:break-before="auto" style:column-width="335.7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Mono" style:font-name-asian="Liberation Mono" style:font-name-complex="Liberation Mono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16380"/>
        <table:table-row table:style-name="ro1">
          <table:table-cell table:style-name="ce1" office:value-type="string" calcext:value-type="string">
            <text:p>Button function</text:p>
          </table:table-cell>
          <table:table-cell table:style-name="ce1" office:value-type="string" calcext:value-type="string">
            <text:p>RAW data</text:p>
          </table:table-cell>
          <table:table-cell table:style-name="ce1" office:value-type="string" calcext:value-type="string">
            <text:p>Protocol decoding</text:p>
          </table:table-cell>
          <table:table-cell table:style-name="ce1" office:value-type="string" calcext:value-type="string">
            <text:p>Prototype transmission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POWER</text:p>
          </table:table-cell>
          <table:table-cell table:style-name="ce6" office:value-type="string" calcext:value-type="string">
            <text:p>0x87BB</text:p>
          </table:table-cell>
          <table:table-cell table:style-name="ce6" office:value-type="string" calcext:value-type="string">
            <text:p>Protocol=PulseDistance, Raw-Data=0x87BB, 16 bits, LSB first, Gap=3276750us, Duration=35700us</text:p>
          </table:table-cell>
          <table:table-cell table:style-name="ce6" office:value-type="string" calcext:value-type="string">
            <text:p>IrSender.sendPulseDistanceWidth(38, 3000, 2950, 600, 1650, 600, 550, 0x87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SPOT</text:p>
          </table:table-cell>
          <table:table-cell table:style-name="ce7" office:value-type="string" calcext:value-type="string">
            <text:p>0x4BBB</text:p>
          </table:table-cell>
          <table:table-cell table:style-name="ce6" office:value-type="string" calcext:value-type="string">
            <text:p>Protocol=PulseDistance, Raw-Data=0x4BBB, 16 bits, LSB first, Gap=3276750us, Duration=35750us</text:p>
          </table:table-cell>
          <table:table-cell table:style-name="ce7" office:value-type="string" calcext:value-type="string">
            <text:p>IrSender.sendPulseDistanceWidth(38, 3000, 3000, 550, 1700, 550, 550, 0x4B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HOME CHARGE</text:p>
          </table:table-cell>
          <table:table-cell table:style-name="ce7" office:value-type="string" calcext:value-type="string">
            <text:p>0xC3BB</text:p>
          </table:table-cell>
          <table:table-cell table:style-name="ce7" office:value-type="string" calcext:value-type="string">
            <text:p>Protocol=PulseDistance, Raw-Data=0xC3BB, 16 bits, LSB first, Gap=3276750us, Duration=35750us</text:p>
          </table:table-cell>
          <table:table-cell table:style-name="ce7" office:value-type="string" calcext:value-type="string">
            <text:p>IrSender.sendPulseDistanceWidth(38, 3050, 2950, 600, 1650, 600, 550, 0xC3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START/PAUSE</text:p>
          </table:table-cell>
          <table:table-cell table:style-name="ce7" office:value-type="string" calcext:value-type="string">
            <text:p>0x69BB</text:p>
          </table:table-cell>
          <table:table-cell table:style-name="ce7" office:value-type="string" calcext:value-type="string">
            <text:p>Protocol=PulseDistance, Raw-Data=0x69BB, 16 bits, LSB first, Gap=3276750us, Duration=35750us</text:p>
          </table:table-cell>
          <table:table-cell table:style-name="ce7" office:value-type="string" calcext:value-type="string">
            <text:p>IrSender.sendPulseDistanceWidth(38, 3050, 2900, 650, 1600, 650, 500, 0x69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UP</text:p>
          </table:table-cell>
          <table:table-cell table:style-name="ce7" office:value-type="string" calcext:value-type="string">
            <text:p>0x2DBB</text:p>
          </table:table-cell>
          <table:table-cell table:style-name="ce7" office:value-type="string" calcext:value-type="string">
            <text:p>Protocol=PulseDistance, Raw-Data=0x2DBB, 16 bits, LSB first, Gap=3276750us, Duration=35750us</text:p>
          </table:table-cell>
          <table:table-cell table:style-name="ce7" office:value-type="string" calcext:value-type="string">
            <text:p>IrSender.sendPulseDistanceWidth(38, 3000, 3000, 550, 1700, 550, 550, 0x2D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DOWN</text:p>
          </table:table-cell>
          <table:table-cell table:style-name="ce7" office:value-type="string" calcext:value-type="string">
            <text:p>0x1EBB</text:p>
          </table:table-cell>
          <table:table-cell table:style-name="ce7" office:value-type="string" calcext:value-type="string">
            <text:p>Protocol=PulseDistance, Raw-Data=0x1EBB, 16 bits, LSB first, Gap=3276750us, Duration=35750us</text:p>
          </table:table-cell>
          <table:table-cell table:style-name="ce7" office:value-type="string" calcext:value-type="string">
            <text:p>IrSender.sendPulseDistanceWidth(38, 3050, 2950, 600, 1650, 600, 550, 0x1E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LEFT</text:p>
          </table:table-cell>
          <table:table-cell table:style-name="ce7" office:value-type="string" calcext:value-type="string">
            <text:p>0xA5BB</text:p>
          </table:table-cell>
          <table:table-cell table:style-name="ce7" office:value-type="string" calcext:value-type="string">
            <text:p>Protocol=PulseDistance, Raw-Data=0xA5BB, 16 bits, LSB first, Gap=3276750us, Duration=35750us</text:p>
          </table:table-cell>
          <table:table-cell table:style-name="ce7" office:value-type="string" calcext:value-type="string">
            <text:p>IrSender.sendPulseDistanceWidth(38, 3000, 3000, 600, 1650, 600, 550, 0xA5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RIGHT</text:p>
          </table:table-cell>
          <table:table-cell table:style-name="ce7" office:value-type="string" calcext:value-type="string">
            <text:p>0xE1BB</text:p>
          </table:table-cell>
          <table:table-cell table:style-name="ce7" office:value-type="string" calcext:value-type="string">
            <text:p>Protocol=PulseDistance, Raw-Data=0xE1BB, 16 bits, LSB first, Gap=3276750us, Duration=35750us</text:p>
          </table:table-cell>
          <table:table-cell table:style-name="ce7" office:value-type="string" calcext:value-type="string">
            <text:p>IrSender.sendPulseDistanceWidth(38, 3050, 2950, 600, 1650, 600, 550, 0xE1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VACUUM POWER</text:p>
          </table:table-cell>
          <table:table-cell table:style-name="ce7" office:value-type="string" calcext:value-type="string">
            <text:p>0xF0BB</text:p>
          </table:table-cell>
          <table:table-cell table:style-name="ce7" office:value-type="string" calcext:value-type="string">
            <text:p>Protocol=PulseDistance, Raw-Data=0xF0BB, 16 bits, LSB first, Gap=3276750us, Duration=35750us</text:p>
          </table:table-cell>
          <table:table-cell table:style-name="ce7" office:value-type="string" calcext:value-type="string">
            <text:p>IrSender.sendPulseDistanceWidth(38, 3000, 3000, 600, 1650, 600, 550, 0xF0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CLEAN BORDERS</text:p>
          </table:table-cell>
          <table:table-cell table:style-name="ce7" office:value-type="string" calcext:value-type="string">
            <text:p>0x78BB</text:p>
          </table:table-cell>
          <table:table-cell table:style-name="ce7" office:value-type="string" calcext:value-type="string">
            <text:p>Protocol=PulseDistance, Raw-Data=0x78BB, 16 bits, LSB first, Gap=3276750us, Duration=35750us</text:p>
          </table:table-cell>
          <table:table-cell table:style-name="ce7" office:value-type="string" calcext:value-type="string">
            <text:p>IrSender.sendPulseDistanceWidth(38, 3000, 3000, 550, 1700, 550, 550, 0x78BB, 16, PROTOCOL_IS_LSB_FIRST, &lt;RepeatPeriodMillis&gt;, &lt;numberOfRepeats&gt;);</text:p>
          </table:table-cell>
          <table:table-cell table:style-name="ce5" table:number-columns-repeated="16380"/>
        </table:table-row>
        <table:table-row table:style-name="ro2" table:number-rows-repeated="1048564">
          <table:table-cell table:number-columns-repeated="4"/>
          <table:table-cell table:style-name="ce5" table:number-columns-repeated="16380"/>
        </table:table-row>
        <table:table-row table:style-name="ro2">
          <table:table-cell table:number-columns-repeated="4"/>
          <table:table-cell table:style-name="ce5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it" fo:country="I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 style:data-style-name="N2" text:time-value="15:53:46.206379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21:38:40.044557268</meta:creation-date>
    <dc:date>2026-06-13T15:54:25.461543952</dc:date>
    <meta:editing-duration>PT21M56S</meta:editing-duration>
    <meta:editing-cycles>5</meta:editing-cycles>
    <meta:generator>LibreOffice/26.2.1.2$Linux_X86_64 LibreOffice_project/8399f6259d8c87f40e7255cdb3c9b958f5e08948</meta:generator>
    <meta:document-statistic meta:table-count="1" meta:cell-count="44" meta:object-count="0"/>
  </office:meta>
</office:document-meta>
</file>